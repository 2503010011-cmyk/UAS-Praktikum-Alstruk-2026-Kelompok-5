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1000001B1845378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Arial1" officeooo:rsid="00035a58" officeooo:paragraph-rsid="00035a58"/>
    </style:style>
    <style:style style:name="P2" style:family="paragraph" style:parent-style-name="Standard">
      <style:text-properties style:font-name="Arial1"/>
    </style:style>
    <style:style style:name="P3" style:family="paragraph" style:parent-style-name="Standard">
      <style:text-properties style:font-name="Arial1" officeooo:paragraph-rsid="00035a58"/>
    </style:style>
    <style:style style:name="P4" style:family="paragraph" style:parent-style-name="Standard">
      <style:text-properties style:font-name="Arial1" officeooo:paragraph-rsid="000ed805"/>
    </style:style>
    <style:style style:name="P5" style:family="paragraph" style:parent-style-name="Standard">
      <style:text-properties officeooo:rsid="00035a58" officeooo:paragraph-rsid="00035a58"/>
    </style:style>
    <style:style style:name="P6" style:family="paragraph" style:parent-style-name="Text_20_body">
      <style:text-properties style:font-name="Arial1" officeooo:rsid="00035a58" officeooo:paragraph-rsid="00035a58"/>
    </style:style>
    <style:style style:name="P7" style:family="paragraph" style:parent-style-name="Table_20_Contents">
      <style:text-properties style:font-name="Arial1" officeooo:rsid="0004fa9c" officeooo:paragraph-rsid="0004fa9c"/>
    </style:style>
    <style:style style:name="P8" style:family="paragraph" style:parent-style-name="Table_20_Contents">
      <style:text-properties style:font-name="Arial1"/>
    </style:style>
    <style:style style:name="P9" style:family="paragraph" style:parent-style-name="Table_20_Contents">
      <style:text-properties style:font-name="Arial1" officeooo:rsid="0004fa9c"/>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Standard">
      <style:text-properties officeooo:rsid="0004fa9c" officeooo:paragraph-rsid="0004fa9c"/>
    </style:style>
    <style:style style:name="P13" style:family="paragraph" style:parent-style-name="Standard">
      <style:text-properties officeooo:paragraph-rsid="0004fa9c"/>
    </style:style>
    <style:style style:name="P14" style:family="paragraph" style:parent-style-name="Standard">
      <style:text-properties officeooo:rsid="00068ae7" officeooo:paragraph-rsid="00068ae7"/>
    </style:style>
    <style:style style:name="P15" style:family="paragraph" style:parent-style-name="Text_20_body">
      <style:paragraph-properties fo:text-align="start" style:justify-single-word="false"/>
    </style:style>
    <style:style style:name="P16" style:family="paragraph" style:parent-style-name="Text_20_body" style:list-style-name="L1">
      <style:paragraph-properties fo:margin-top="0in" fo:margin-bottom="0in" style:contextual-spacing="false"/>
      <style:text-properties fo:font-size="13pt" style:font-size-asian="13pt" style:font-size-complex="13pt"/>
    </style:style>
    <style:style style:name="P17" style:family="paragraph" style:parent-style-name="Text_20_body" style:list-style-name="L1">
      <style:text-properties fo:font-size="13pt" style:font-size-asian="13pt" style:font-size-complex="13pt"/>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paragraph-properties fo:margin-top="0in" fo:margin-bottom="0in" style:contextual-spacing="false"/>
      <style:text-properties fo:font-size="13pt" officeooo:paragraph-rsid="0009c2ac" style:font-size-asian="13pt" style:font-size-complex="13pt"/>
    </style:style>
    <style:style style:name="P20" style:family="paragraph" style:parent-style-name="Text_20_body" style:list-style-name="L2">
      <style:paragraph-properties fo:margin-top="0in" fo:margin-bottom="0in" style:contextual-spacing="false"/>
      <style:text-properties fo:font-size="13pt" style:font-size-asian="13pt" style:font-size-complex="13pt"/>
    </style:style>
    <style:style style:name="P21" style:family="paragraph" style:parent-style-name="Text_20_body" style:list-style-name="L2">
      <style:text-properties fo:font-size="13pt" style:font-size-asian="13pt" style:font-size-complex="13pt"/>
    </style:style>
    <style:style style:name="P22" style:family="paragraph" style:parent-style-name="Text_20_body" style:list-style-name="L3">
      <style:paragraph-properties fo:margin-top="0in" fo:margin-bottom="0in" style:contextual-spacing="false"/>
      <style:text-properties fo:font-size="13pt" style:font-size-asian="13pt" style:font-size-complex="13pt"/>
    </style:style>
    <style:style style:name="P23" style:family="paragraph" style:parent-style-name="Text_20_body" style:list-style-name="L3">
      <style:text-properties fo:font-size="13pt" style:font-size-asian="13pt" style:font-size-complex="13pt"/>
    </style:style>
    <style:style style:name="P24" style:family="paragraph" style:parent-style-name="Text_20_body" style:list-style-name="L4">
      <style:paragraph-properties fo:margin-top="0in" fo:margin-bottom="0in" style:contextual-spacing="false"/>
      <style:text-properties fo:font-size="13pt" style:font-size-asian="13pt" style:font-size-complex="13pt"/>
    </style:style>
    <style:style style:name="P25" style:family="paragraph" style:parent-style-name="Text_20_body" style:list-style-name="L4">
      <style:text-properties fo:font-size="13pt" style:font-size-asian="13pt" style:font-size-complex="13pt"/>
    </style:style>
    <style:style style:name="P26" style:family="paragraph" style:parent-style-name="Text_20_body" style:list-style-name="L5">
      <style:paragraph-properties fo:margin-top="0in" fo:margin-bottom="0in" style:contextual-spacing="false"/>
      <style:text-properties fo:font-size="13pt" style:font-size-asian="13pt" style:font-size-complex="13pt"/>
    </style:style>
    <style:style style:name="P27" style:family="paragraph" style:parent-style-name="Text_20_body" style:list-style-name="L5">
      <style:text-properties fo:font-size="13pt" style:font-size-asian="13pt" style:font-size-complex="13pt"/>
    </style:style>
    <style:style style:name="P28" style:family="paragraph" style:parent-style-name="Text_20_body" style:list-style-name="L6">
      <style:paragraph-properties fo:margin-top="0in" fo:margin-bottom="0in" style:contextual-spacing="false"/>
      <style:text-properties fo:font-size="13pt" style:font-size-asian="13pt" style:font-size-complex="13pt"/>
    </style:style>
    <style:style style:name="P29" style:family="paragraph" style:parent-style-name="Text_20_body" style:list-style-name="L6">
      <style:text-properties fo:font-size="13pt" style:font-size-asian="13pt" style:font-size-complex="13pt"/>
    </style:style>
    <style:style style:name="P30" style:family="paragraph" style:parent-style-name="Standard">
      <style:text-properties officeooo:rsid="0006c4bf" officeooo:paragraph-rsid="0006c4bf"/>
    </style:style>
    <style:style style:name="P31" style:family="paragraph" style:parent-style-name="Text_20_body">
      <style:text-properties officeooo:rsid="0006c4bf" officeooo:paragraph-rsid="0006c4bf"/>
    </style:style>
    <style:style style:name="P32" style:family="paragraph" style:parent-style-name="Text_20_body" style:list-style-name="L7">
      <style:paragraph-properties fo:margin-top="0in" fo:margin-bottom="0in" style:contextual-spacing="false"/>
    </style:style>
    <style:style style:name="P33" style:family="paragraph" style:parent-style-name="Text_20_body" style:list-style-name="L7"/>
    <style:style style:name="P34" style:family="paragraph" style:parent-style-name="Text_20_body">
      <style:text-properties officeooo:paragraph-rsid="000ed805"/>
    </style:style>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text-properties officeooo:paragraph-rsid="000ed805"/>
    </style:style>
    <style:style style:name="P40" style:family="paragraph" style:parent-style-name="Text_20_body">
      <style:text-properties officeooo:rsid="0006c4bf" officeooo:paragraph-rsid="000ed805"/>
    </style:style>
    <style:style style:name="T1" style:family="text">
      <style:text-properties officeooo:rsid="00035a58"/>
    </style:style>
    <style:style style:name="T2" style:family="text">
      <style:text-properties officeooo:rsid="000815ed"/>
    </style:style>
    <style:style style:name="T3" style:family="text">
      <style:text-properties officeooo:rsid="0009c2a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a8b84"/>
    </style:style>
    <style:style style:name="T6" style:family="text">
      <style:text-properties officeooo:rsid="000c7393"/>
    </style:style>
    <style:style style:name="T7" style:family="text">
      <style:text-properties officeooo:rsid="000df16c"/>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PORAN PROYEK UAS</text:p>
      <text:p text:style-name="P2"/>
      <text:p text:style-name="P1">SISTEM MANAJEMN EVENT KAMPUS</text:p>
      <text:p text:style-name="P3"/>
      <text:p text:style-name="P3"><text:span text:style-name="T1">Mata Kuliah: Algoritma dan Struktur Data</text:span><text:tab/><text:tab/><text:tab/><text:tab/><text:tab/><text:tab/><text:tab/><text:tab/><text:tab/><text:tab/><text:tab/><text:tab/><text:tab/><text:tab/><text:tab/><text:tab/><text:tab/><text:tab/><text:tab/><text:tab/><text:tab/><text:tab/><text:tab/><text:tab/><text:tab/><text:tab/><text:tab/><text:tab/></text:p>
      <text:p text:style-name="P2"/>
      <text:p text:style-name="P2"/>
      <text:p text:style-name="P2"/>
      <text:p text:style-name="P2"/>
      <text:p text:style-name="P4"/>
      <text:p text:style-name="P2"><draw:frame draw:style-name="fr1" draw:name="Picture 4" text:anchor-type="char" svg:x="2.3626in" svg:y="0.0118in" svg:width="1.9689in" svg:height="1.9689in" draw:z-index="0"><draw:image xlink:href="Pictures/10000001000001B1000001B1845378E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Disusun oleh :</text:p>
      <text:p text:style-name="P1">Kelompok 5</text:p>
      <text:p text:style-name="P1">Elvan Ghilman Aminudien</text:p>
      <text:p text:style-name="P1">Hasbullah Ali Kumaeni</text:p>
      <text:p text:style-name="P1">Ilham Maulana</text:p>
      <text:p text:style-name="P1">Muhammad Fawwaz Khairullah</text:p>
      <text:p text:style-name="P1">Rizkan Anwar Fauzi</text:p>
      <text:p text:style-name="P1"/>
      <text:p text:style-name="P1"/>
      <text:p text:style-name="P1"/>
      <text:p text:style-name="P1">Program Studi Teknik Informatika </text:p>
      <text:p text:style-name="P1">Universitas Perjuangan</text:p>
      <text:p text:style-name="P1">2026</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DAFTAR ANGGOTA KELOMPOK</text:p>
      <table:table table:name="Table1" table:style-name="Table1">
        <table:table-column table:style-name="Table1.A" table:number-columns-repeated="3"/>
        <table:table-row>
          <table:table-cell table:style-name="Table1.A1" office:value-type="string">
            <text:p text:style-name="P7">No</text:p>
          </table:table-cell>
          <table:table-cell table:style-name="Table1.A1" office:value-type="string">
            <text:p text:style-name="P7">Nama</text:p>
          </table:table-cell>
          <table:table-cell table:style-name="Table1.C1" office:value-type="string">
            <text:p text:style-name="P7">Peran</text:p>
          </table:table-cell>
        </table:table-row>
        <table:table-row>
          <table:table-cell table:style-name="Table1.A2" office:value-type="string">
            <text:p text:style-name="P7">1</text:p>
          </table:table-cell>
          <table:table-cell table:style-name="Table1.A2" office:value-type="string">
            <text:p text:style-name="P7">Ilham Maulana</text:p>
          </table:table-cell>
          <table:table-cell table:style-name="Table1.C2" office:value-type="string">
            <text:p text:style-name="P7">Lead Developer</text:p>
          </table:table-cell>
        </table:table-row>
        <table:table-row>
          <table:table-cell table:style-name="Table1.A2" office:value-type="string">
            <text:p text:style-name="P7">2</text:p>
          </table:table-cell>
          <table:table-cell table:style-name="Table1.A2" office:value-type="string">
            <text:p text:style-name="P8">-</text:p>
          </table:table-cell>
          <table:table-cell table:style-name="Table1.C2" office:value-type="string">
            <text:p text:style-name="P8">-</text:p>
          </table:table-cell>
        </table:table-row>
        <table:table-row>
          <table:table-cell table:style-name="Table1.A2" office:value-type="string">
            <text:p text:style-name="P7">3</text:p>
          </table:table-cell>
          <table:table-cell table:style-name="Table1.A2" office:value-type="string">
            <text:p text:style-name="P9">-</text:p>
          </table:table-cell>
          <table:table-cell table:style-name="Table1.C2" office:value-type="string">
            <text:p text:style-name="P8">-</text:p>
          </table:table-cell>
        </table:table-row>
        <table:table-row>
          <table:table-cell table:style-name="Table1.A2" office:value-type="string">
            <text:p text:style-name="P7">4</text:p>
          </table:table-cell>
          <table:table-cell table:style-name="Table1.A2" office:value-type="string">
            <text:p text:style-name="P8">-</text:p>
          </table:table-cell>
          <table:table-cell table:style-name="Table1.C2" office:value-type="string">
            <text:p text:style-name="P8">-</text:p>
          </table:table-cell>
        </table:table-row>
        <table:table-row>
          <table:table-cell table:style-name="Table1.A2" office:value-type="string">
            <text:p text:style-name="P7">5</text:p>
          </table:table-cell>
          <table:table-cell table:style-name="Table1.A2" office:value-type="string">
            <text:p text:style-name="P8">-</text:p>
          </table:table-cell>
          <table:table-cell table:style-name="Table1.C2" office:value-type="string">
            <text:p text:style-name="P8">-</text:p>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DAFTAR ISI</text:p>
          </text:index-title>
          <text:p text:style-name="P10"><text:a xlink:type="simple" xlink:href="#__RefHeading___Toc510_2629332932" text:style-name="Index_20_Link" text:visited-style-name="Index_20_Link">BAB I STUDI KASUS<text:tab/>4</text:a></text:p>
          <text:p text:style-name="P10"><text:a xlink:type="simple" xlink:href="#__RefHeading___Toc512_2629332932" text:style-name="Index_20_Link" text:visited-style-name="Index_20_Link">BAB II ANALISIS KEBUTUHAN SISTEM<text:tab/>4</text:a></text:p>
          <text:p text:style-name="P11"><text:a xlink:type="simple" xlink:href="#__RefHeading___Toc972_2629332932" text:style-name="Index_20_Link" text:visited-style-name="Index_20_Link">A. Deskripsi Kebutuhan Sistem<text:tab/>4</text:a></text:p>
          <text:p text:style-name="P11"><text:a xlink:type="simple" xlink:href="#__RefHeading___Toc974_2629332932" text:style-name="Index_20_Link" text:visited-style-name="Index_20_Link">B. Daftar Fitur Aplikasi<text:tab/>4</text:a></text:p>
          <text:p text:style-name="P10"><text:a xlink:type="simple" xlink:href="#__RefHeading___Toc526_2629332932" text:style-name="Index_20_Link" text:visited-style-name="Index_20_Link">BAB III DESAIN SISTEM<text:tab/>5</text:a></text:p>
          <text:p text:style-name="P10"><text:a xlink:type="simple" xlink:href="#__RefHeading___Toc769_1132704099" text:style-name="Index_20_Link" text:visited-style-name="Index_20_Link">BAB IV STRUKTUR DATA YANG DIGUNAKAN<text:tab/>6</text:a></text:p>
          <text:p text:style-name="P11"><text:a xlink:type="simple" xlink:href="#__RefHeading___Toc1071_2629332932" text:style-name="Index_20_Link" text:visited-style-name="Index_20_Link">A. Linked List<text:tab/>6</text:a></text:p>
          <text:p text:style-name="P11"><text:a xlink:type="simple" xlink:href="#__RefHeading___Toc1073_2629332932" text:style-name="Index_20_Link" text:visited-style-name="Index_20_Link">B. Queue<text:tab/>6</text:a></text:p>
          <text:p text:style-name="P11"><text:a xlink:type="simple" xlink:href="#__RefHeading___Toc1075_2629332932" text:style-name="Index_20_Link" text:visited-style-name="Index_20_Link">C. Array<text:tab/>6</text:a></text:p>
          <text:p text:style-name="P11"><text:a xlink:type="simple" xlink:href="#__RefHeading___Toc1077_2629332932" text:style-name="Index_20_Link" text:visited-style-name="Index_20_Link">C. Binary Search Tree (BST)<text:tab/>6</text:a></text:p>
          <text:p text:style-name="P10"><text:a xlink:type="simple" xlink:href="#__RefHeading___Toc1079_2629332932" text:style-name="Index_20_Link" text:visited-style-name="Index_20_Link">BAB V ALASAN PEMILIHAN STRUKTUR DATA<text:tab/>7</text:a></text:p>
          <text:p text:style-name="P11"><text:a xlink:type="simple" xlink:href="#__RefHeading___Toc1081_2629332932" text:style-name="Index_20_Link" text:visited-style-name="Index_20_Link">A. Linked List<text:tab/>7</text:a></text:p>
          <text:p text:style-name="P11"><text:a xlink:type="simple" xlink:href="#__RefHeading___Toc1083_2629332932" text:style-name="Index_20_Link" text:visited-style-name="Index_20_Link">B. Queue<text:tab/>7</text:a></text:p>
          <text:p text:style-name="P11"><text:a xlink:type="simple" xlink:href="#__RefHeading___Toc1085_2629332932" text:style-name="Index_20_Link" text:visited-style-name="Index_20_Link">C. Array<text:tab/>7</text:a></text:p>
          <text:p text:style-name="P11"><text:a xlink:type="simple" xlink:href="#__RefHeading___Toc1087_2629332932" text:style-name="Index_20_Link" text:visited-style-name="Index_20_Link">D. Binary Search Tree (BST)<text:tab/>7</text:a></text:p>
          <text:p text:style-name="P10"><text:a xlink:type="simple" xlink:href="#__RefHeading___Toc771_1132704099" text:style-name="Index_20_Link" text:visited-style-name="Index_20_Link">BAB VI PEMBAGIAN TUGAS ANGGOTA<text:tab/>7</text:a></text:p>
          <text:p text:style-name="P10"><text:a xlink:type="simple" xlink:href="#__RefHeading___Toc773_1132704099" text:style-name="Index_20_Link" text:visited-style-name="Index_20_Link">BAB VII SCREENSHOT COMMIT DAN PULL REQUEST GITHUB<text:tab/>7</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
      <text:h text:style-name="Heading_20_1" text:outline-level="1"><text:bookmark-start text:name="__RefHeading___Toc510_2629332932"/>BAB I STUDI KASUS<text:bookmark-end text:name="__RefHeading___Toc510_2629332932"/></text:h>
      <text:p text:style-name="P14"/>
      <text:p text:style-name="P14">Sistem Manajemen Event Kampus merupakan aplikasi berbasis C++ yang digunakan untuk mengelola berbagai kegiatan kampus seperti seminar, workshop, lomba, dan kegiatan organisasi mahasiswa. Sistem ini membantu pengelolaan data event, peserta, jadwal kegiatan, dan struktur kepanitiaan secara terorganisir. </text:p>
      <text:h text:style-name="Heading_20_1" text:outline-level="1" text:is-list-header="true"/>
      <text:h text:style-name="Heading_20_1" text:outline-level="1"><text:bookmark-start text:name="__RefHeading___Toc512_2629332932"/>BAB II A<text:span text:style-name="T2">NALISIS</text:span> K<text:span text:style-name="T2">EBUTUHAN</text:span> S<text:span text:style-name="T2">ISTEM</text:span><text:bookmark-end text:name="__RefHeading___Toc512_2629332932"/></text:h>
      <text:h text:style-name="Heading_20_2" text:outline-level="2"><text:bookmark-start text:name="__RefHeading___Toc972_2629332932"/><text:span text:style-name="T3">A. </text:span>Deskripsi Kebutuhan Sistem <text:bookmark-end text:name="__RefHeading___Toc972_2629332932"/></text:h>
      <text:p text:style-name="Text_20_body">Sistem Manajemen Event Kampus adalah aplikasi berbasis C++ yang dirancang untuk membantu pengelolaan kegiatan kampus secara terstruktur. Sistem ini memungkinkan pengguna untuk mengelola data event, pendaftaran peserta, jadwal kegiatan, struktur kepanitiaan, serta melakukan pencarian informasi terkait kegiatan kampus. Dengan adanya sistem ini, proses administrasi event menjadi lebih efisien, terorganisir, dan mudah diakses.</text:p>
      <text:h text:style-name="Heading_20_2" text:outline-level="2"><text:bookmark-start text:name="__RefHeading___Toc974_2629332932"/>B. Daftar Fitur Aplikasi<text:bookmark-end text:name="__RefHeading___Toc974_2629332932"/></text:h>
      <text:p text:style-name="P15"><text:bookmark-start text:name="__RefHeading___Toc514_2629332932"/><text:span text:style-name="Emphasis"><text:span text:style-name="T4">1. Manajemen Event</text:span></text:span><text:bookmark-end text:name="__RefHeading___Toc514_2629332932"/></text:p>
      <text:list text:style-name="L1">
        <text:list-item>
          <text:p text:style-name="P16">Tambah event </text:p>
        </text:list-item>
        <text:list-item>
          <text:p text:style-name="P16">Edit event </text:p>
        </text:list-item>
        <text:list-item>
          <text:p text:style-name="P16">Hapus event </text:p>
        </text:list-item>
        <text:list-item>
          <text:p text:style-name="P17">Lihat daftar event </text:p>
        </text:list-item>
      </text:list>
      <text:p text:style-name="P18"><text:span text:style-name="T3">2. </text:span>Manajemen Peserta</text:p>
      <text:list text:style-name="L2">
        <text:list-item>
          <text:p text:style-name="P19">Daftar peserta ke event </text:p>
        </text:list-item>
        <text:list-item>
          <text:p text:style-name="P20">Batalkan pendaftaran peserta </text:p>
        </text:list-item>
        <text:list-item>
          <text:p text:style-name="P21">Lihat daftar peserta </text:p>
        </text:list-item>
      </text:list>
      <text:p text:style-name="P18"><text:bookmark-start text:name="__RefHeading___Toc518_2629332932"/><text:span text:style-name="T3">3. </text:span>Manajemen Jadwal<text:bookmark-end text:name="__RefHeading___Toc518_2629332932"/></text:p>
      <text:list text:style-name="L3">
        <text:list-item>
          <text:p text:style-name="P22">Tambah jadwal acara </text:p>
        </text:list-item>
        <text:list-item>
          <text:p text:style-name="P22">Lihat jadwal acara </text:p>
        </text:list-item>
        <text:list-item>
          <text:p text:style-name="P23">Edit jadwal acara </text:p>
        </text:list-item>
      </text:list>
      <text:p text:style-name="P18"><text:bookmark-start text:name="__RefHeading___Toc520_2629332932"/><text:span text:style-name="T3">4. </text:span>Struktur Kepanitiaan<text:bookmark-end text:name="__RefHeading___Toc520_2629332932"/></text:p>
      <text:list text:style-name="L4">
        <text:list-item>
          <text:p text:style-name="P24">Tambah anggota panitia </text:p>
        </text:list-item>
        <text:list-item>
          <text:p text:style-name="P24">Hapus anggota panitia </text:p>
        </text:list-item>
        <text:list-item>
          <text:p text:style-name="P25">Tampilkan struktur panitia </text:p>
        </text:list-item>
      </text:list>
      <text:p text:style-name="P18"><text:bookmark-start text:name="__RefHeading___Toc522_2629332932"/><text:span text:style-name="T3">5. </text:span>Pencarian<text:bookmark-end text:name="__RefHeading___Toc522_2629332932"/></text:p>
      <text:list text:style-name="L5">
        <text:list-item>
          <text:p text:style-name="P26"><text:soft-page-break/>Cari event berdasarkan nama </text:p>
        </text:list-item>
        <text:list-item>
          <text:p text:style-name="P26">Cari peserta berdasarkan NIM </text:p>
        </text:list-item>
        <text:list-item>
          <text:p text:style-name="P27">Cari anggota panitia berdasarkan nama </text:p>
        </text:list-item>
      </text:list>
      <text:p text:style-name="P18"><text:bookmark-start text:name="__RefHeading___Toc524_2629332932"/><text:span text:style-name="T3">6. </text:span>Laporan<text:bookmark-end text:name="__RefHeading___Toc524_2629332932"/></text:p>
      <text:list text:style-name="L6">
        <text:list-item>
          <text:p text:style-name="P28">Jumlah event </text:p>
        </text:list-item>
        <text:list-item>
          <text:p text:style-name="P28">Jumlah peserta setiap event </text:p>
        </text:list-item>
        <text:list-item>
          <text:p text:style-name="P29">Daftar panitia</text:p>
        </text:list-item>
      </text:list>
      <text:p text:style-name="P14"/>
      <text:h text:style-name="Heading_20_1" text:outline-level="1" text:is-list-header="true"><text:bookmark-start text:name="__RefHeading___Toc526_2629332932"/>BAB III D<text:span text:style-name="T2">ESAIN SISTEM</text:span><text:bookmark-end text:name="__RefHeading___Toc526_2629332932"/></text:h>
      <text:p text:style-name="P30"/>
      <text:p text:style-name="P31">Struktur Menu:</text:p>
      <text:list text:style-name="L7">
        <text:list-item>
          <text:p text:style-name="P32">Kelola Event</text:p>
        </text:list-item>
        <text:list-item>
          <text:p text:style-name="P32">Kelola Peserta</text:p>
        </text:list-item>
        <text:list-item>
          <text:p text:style-name="P32">Kelola Jadwal</text:p>
        </text:list-item>
        <text:list-item>
          <text:p text:style-name="P32">Kelola Panitia</text:p>
        </text:list-item>
        <text:list-item>
          <text:p text:style-name="P32">Pencarian Data</text:p>
        </text:list-item>
        <text:list-item>
          <text:p text:style-name="P32">Laporan</text:p>
        </text:list-item>
        <text:list-item>
          <text:p text:style-name="P33">Keluar</text:p>
        </text:list-item>
      </text:list>
      <text:p text:style-name="P31">Alur Program:</text:p>
      <text:p text:style-name="P34">Mulai<text:line-break/>↓<text:line-break/>Menu Utama<text:line-break/>↓<text:line-break/>Pilih Fitur<text:line-break/>↓<text:line-break/>Proses Data<text:line-break/>↓<text:line-break/>Tampilkan Hasil<text:line-break/>↓<text:line-break/>Kembali ke Menu<text:line-break/>↓<text:line-break/>Selesai</text:p>
      <text:p text:style-name="P34"/>
      <text:p text:style-name="P34"/>
      <text:p text:style-name="P34"/>
      <text:p text:style-name="P34"/>
      <text:p text:style-name="P34"/>
      <text:p text:style-name="P34"/>
      <text:p text:style-name="P34"/>
      <text:h text:style-name="Heading_20_1" text:outline-level="1" text:is-list-header="true"><text:bookmark-start text:name="__RefHeading___Toc769_1132704099"/><text:soft-page-break/>BAB IV S<text:span text:style-name="T2">TRUKTUR DATA YANG DIGUNAKAN</text:span><text:bookmark-end text:name="__RefHeading___Toc769_1132704099"/></text:h>
      <text:h text:style-name="Heading_20_2" text:outline-level="2"><text:bookmark-start text:name="__RefHeading___Toc1071_2629332932"/>A. Linked List<text:bookmark-end text:name="__RefHeading___Toc1071_2629332932"/></text:h>
      <text:p text:style-name="Text_20_body">Linked List digunakan untuk menyimpan data event dan data panitia. Struktur data ini dipilih karena memungkinkan penambahan dan penghapusan data secara dinamis tanpa harus menggeser elemen lain seperti pada array.</text:p>
      <text:p text:style-name="Text_20_body">Implementasi:</text:p>
      <text:list text:style-name="L8">
        <text:list-item>
          <text:p text:style-name="P35">Data Event </text:p>
        </text:list-item>
        <text:list-item>
          <text:p text:style-name="P36">Data Panitia</text:p>
        </text:list-item>
      </text:list>
      <text:p text:style-name="P30"/>
      <text:h text:style-name="Heading_20_2" text:outline-level="2"><text:bookmark-start text:name="__RefHeading___Toc1073_2629332932"/>B. Queue<text:bookmark-end text:name="__RefHeading___Toc1073_2629332932"/></text:h>
      <text:p text:style-name="Text_20_body">Queue digunakan untuk mengelola data peserta yang mendaftar pada suatu event. Queue menerapkan konsep FIFO (First In First Out), yaitu peserta yang mendaftar lebih dahulu akan diproses lebih dahulu.</text:p>
      <text:p text:style-name="Text_20_body">Implementasi:</text:p>
      <text:list text:style-name="L9">
        <text:list-item>
          <text:p text:style-name="P37">Pendaftaran peserta</text:p>
        </text:list-item>
      </text:list>
      <text:h text:style-name="Heading_20_2" text:outline-level="2"><text:bookmark-start text:name="__RefHeading___Toc1075_2629332932"/><text:span text:style-name="T5">C</text:span>. Array<text:bookmark-end text:name="__RefHeading___Toc1075_2629332932"/></text:h>
      <text:p text:style-name="Text_20_body">Array digunakan untuk menyimpan data jadwal kegiatan karena jumlah jadwal relatif terkontrol dan mudah diakses menggunakan indeks.</text:p>
      <text:p text:style-name="Text_20_body">Implementasi:</text:p>
      <text:list text:style-name="L10">
        <text:list-item>
          <text:p text:style-name="P38">Jadwal kegiatan</text:p>
        </text:list-item>
      </text:list>
      <text:h text:style-name="Heading_20_2" text:outline-level="2"><text:bookmark-start text:name="__RefHeading___Toc1077_2629332932"/>C. Binary Search Tree (BST)<text:bookmark-end text:name="__RefHeading___Toc1077_2629332932"/></text:h>
      <text:p text:style-name="Text_20_body">Binary Search Tree digunakan untuk mempercepat proses pencarian data event berdasarkan nama atau ID event.</text:p>
      <text:p text:style-name="Text_20_body">Implementasi:</text:p>
      <text:list text:style-name="L11">
        <text:list-item>
          <text:p text:style-name="P39">Pencarian Event</text:p>
          <text:p text:style-name="P39"/>
          <text:p text:style-name="P39"/>
          <text:p text:style-name="P39"/>
          <text:p text:style-name="P39"/>
          <text:p text:style-name="P39"/>
          <text:p text:style-name="P39"/>
          <text:p text:style-name="P39"/>
        </text:list-item>
      </text:list>
      <text:p text:style-name="P34"/>
      <text:h text:style-name="Heading_20_1" text:outline-level="1"><text:soft-page-break/>BAB V ALASAN PEMILIHAN STRUKTUR DATA </text:h>
      <text:h text:style-name="Heading_20_2" text:outline-level="2"><text:bookmark-start text:name="__RefHeading___Toc1081_2629332932"/>A. Linked List<text:bookmark-end text:name="__RefHeading___Toc1081_2629332932"/></text:h>
      <text:p text:style-name="Text_20_body">Linked List dipilih karena data event dan panitia dapat bertambah atau berkurang sewaktu-waktu. Dengan Linked List, proses penambahan dan penghapusan data dapat dilakukan dengan lebih fleksibel tanpa harus menggeser seluruh data seperti pada array.</text:p>
      <text:h text:style-name="Heading_20_2" text:outline-level="2"><text:bookmark-start text:name="__RefHeading___Toc1083_2629332932"/>B. Queue<text:bookmark-end text:name="__RefHeading___Toc1083_2629332932"/></text:h>
      <text:p text:style-name="Text_20_body">Queue dipilih untuk mengelola data peserta yang mendaftar pada event karena sesuai dengan konsep FIFO (<text:span text:style-name="Emphasis">First In First Out</text:span>). Peserta yang mendaftar lebih dahulu akan diproses lebih dahulu sehingga proses pendaftaran menjadi lebih teratur.</text:p>
      <text:h text:style-name="Heading_20_2" text:outline-level="2"><text:bookmark-start text:name="__RefHeading___Toc1085_2629332932"/><text:span text:style-name="T6">C</text:span>. Array<text:bookmark-end text:name="__RefHeading___Toc1085_2629332932"/></text:h>
      <text:p text:style-name="Text_20_body">Array dipilih untuk menyimpan data jadwal kegiatan karena data jadwal memiliki struktur yang sederhana dan mudah diakses menggunakan indeks. Selain itu, penggunaan array memudahkan proses penampilan jadwal secara berurutan.</text:p>
      <text:p text:style-name="P30"/>
      <text:h text:style-name="Heading_20_2" text:outline-level="2"><text:bookmark-start text:name="__RefHeading___Toc1087_2629332932"/><text:span text:style-name="T6">D</text:span>. Binary Search Tree (BST)<text:bookmark-end text:name="__RefHeading___Toc1087_2629332932"/></text:h>
      <text:p text:style-name="Text_20_body">Binary Search Tree dipilih untuk mempercepat proses pencarian data event. Dibandingkan pencarian secara linear, BST dapat mengurangi waktu pencarian terutama ketika jumlah data event semakin banyak.</text:p>
      <text:p text:style-name="P30"/>
      <text:p text:style-name="P40">Pemilihan Linked List, Queue, Binary Search Tree, dan Array dilakukan karena masing-masing struktur data memiliki fungsi yang sesuai dengan kebutuhan Sistem Manajemen Event Kampus. Dengan penggunaan struktur data yang tepat, pengelolaan data menjadi lebih efisien, terorganisir, dan mudah dikembangkan di masa mendatang.</text:p>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1" text:outline-level="1"><text:soft-page-break/><text:span text:style-name="T7">BAB VI </text:span>PEMBAGIAN TUGAS ANGGOTA </text:h>
      <text:p text:style-name="Text_20_body"/>
      <text:p text:style-name="Text_20_body"/>
      <text:p text:style-name="Text_20_body"/>
      <text:h text:style-name="Heading_20_1" text:outline-level="1"><text:bookmark-start text:name="__RefHeading___Toc773_1132704099"/>BAB VII SCREENSHOT COMMIT DAN PULL REQUEST GITHUB<text:bookmark-end text:name="__RefHeading___Toc773_1132704099"/></text:h>
      <text:h text:style-name="Heading_20_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D"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6-12T22:21:32.934000000</meta:creation-date>
    <dc:date>2026-06-18T13:37:14.239000000</dc:date>
    <meta:editing-duration>PT1H14S</meta:editing-duration>
    <meta:editing-cycles>7</meta:editing-cycles>
    <meta:generator>LibreOffice/24.8.0.3$Windows_X86_64 LibreOffice_project/0bdf1299c94fe897b119f97f3c613e9dca6be583</meta:generator>
    <meta:document-statistic meta:table-count="1" meta:image-count="1" meta:object-count="0" meta:page-count="8" meta:paragraph-count="129" meta:word-count="727" meta:character-count="4673" meta:non-whitespace-character-count="4054"/>
  </office:meta>
</office:document-meta>
</file>